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 Cn" svg:font-family="'Noto Sans Devanagari Cn'" style:font-family-generic="roman" style:font-pitch="variable"/>
    <style:font-face style:name="Noto Sans Mono" svg:font-family="'Noto Sans Mono'" style:font-family-generic="roman" style:font-pitch="variable"/>
    <style:font-face style:name="Noto Sans Mono Condensed" svg:font-family="'Noto Sans Mono Condensed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.3000001907349pt" style:font-size-asian="9.85000038146973pt" style:font-size-complex="11.300000190734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 ಪ್ರವೇಶಃ ↩ ### ಗ್ರಾಹ್ಯತಮಾಂಶ-ಕಲನಂ ↩ - ಆಧುನಿಕ-ಭೂತ-ಶಾಸ್ತ್ರಂ ಅನು ಪರಮಾಣೂನಾಂ, ಅಣೂನಾಂ, ರೂಪಸ್ಯ, ಶಬ್ದಸ್ಯ, ತಾಪಸ್ಯ, ಕ್ರಿಯಾಣಾಂ ನಿರ್ವಚನಂ. ↩ - ತದ್ ಅನು ನವಃ ಕಶ್ಚನ ಪದಾರ್ಥವಿಭಾಗಃ. ↩ - ಋತಸ್ಯ ಸತ್ಯಸ್ಯ ಚ ನಿರ್ವಚನಂ. <text:s text:c="2"/>↩ - ಜೀವಾತ್ಮಾವಲೋಕನಂ. <text:s/>↩ <text:s text:c="2"/>- ಜೀವಸ್ಯ ಸ್ವಾಭಾವಿಕಸ್ಯ ದಾಸ್ಯಸ್ಯ ಜ್ಞಾನೇನ ಬಂಧಸ್ಯ ಮೋಕ್ಷಸ್ಯ ಚ ಕಲನಂ. ↩ - ದೇವ-ತತ್ತ್ವ-ನಿರ್ಣಯಃ. ↩ <text:s/>↩ &lt;details&gt;&lt;summary&gt;ಸಂಬದ್ಧಚರ್ಚಾ&lt;/summary&gt; ↩ <text:s/>↩ - ೨೦೧೭-ಪಾಠಃ ಕಶ್ಚನ [+ಅತ್ರ](https://docs.google.com/document/d/1KWa2ZqOCqdeYC3I0-Sf6ywua2__WDpKgW1IRFkcXb7A/edit#) - version history ಇತಿ ದ್ರಷ್ಟವ್ಯಂ. ↩ &lt;/details&gt; ↩ <text:s/>↩ <text:s/>↩ <text:s/>↩ ### ಮಂಗಲಶ್ಲೋಕಃ ↩ ..ಓಂ ಹಯಗ್ರೀವಾಯ ನಮಃ.. <text:s text:c="2"/>↩ ಪದಾರ್ಥೇಷು ಭವೇಜ್ ಜ್ಞಾನಂ <text:s text:c="2"/>↩ ಜೀರ್ಣಂ ಕುಬ್ಜಂ ನ ಧಿಕ್ಕೃತಂ. <text:s text:c="2"/>↩ ಇತಿ ಕಾಲೇ ನವೀಕರ್ತುಂ <text:s text:c="2"/>↩ ಯುಕ್ತಿಂ ದೇಹಿ ಗಜಾನನ.. <text:s text:c="2"/>↩ <text:s/>↩ &lt;details&gt;&lt;summary&gt;ವಿಸ್ತಾರಃ (ದ್ರಷ್ಟುಂ ನೋದ್ಯಂ)&lt;/summary&gt; ↩ <text:s/>↩ ಪ್ರಸಿದ್ಧಸ್ಯ ತರ್ಕಸಂಗ್ರಹಸ್ಯಾಧುನಿಕ-ವಿಜ್ಞಾನೇನ ಸಾಕಂ ಅಸಾಮಂಜಸ್ಯಂ ಲಕ್ಷ್ಯತೇ ವಿಶಿಷ್ಯ ದ್ರವ್ಯ-ಲಕ್ಷಣೇಷು. ↩ &lt;/details&gt; ↩ <text:s/>↩ <text:s/>↩ **ಕಾಣಾದಂ ಪಾಣಿನೀಯಞ್** ಚ <text:s text:c="2"/>↩ ಸರ್ವ-ಶಾಸ್ತ್ರೋಪಕಾರಕಂ. <text:s text:c="2"/>↩ ಇತಿ ನತ್ವಾಽಥ ತಸ್ಯೈವ <text:s text:c="2"/>↩ ಧಾರಾಂ ಅತ್ರಾನುವರ್ತಯೇ.. <text:s text:c="2"/>↩ <text:s/>↩ &lt;details&gt;&lt;summary&gt;ವಿಸ್ತಾರಃ (ದ್ರಷ್ಟುಂ ನೋದ್ಯಂ)&lt;/summary&gt; ↩ <text:s/>↩ “ಪ್ರತೀತಿ-ಶರಣಾ ನೈಯಾಯಿಕಾಃ” ಇತಿ ಸತಿ ಪರಿಷ್ಕಾರೋ ಯುಕ್ತಃ. ಪ್ರಾಮಾಣಿಕ-ಬುದ್ಧೇರ್ ಧೀಮತಃ ಕಣಾದ-ಮಹರ್ಷೇರ್ ಅಪ್ಯ್ ಅಯಂ ಶೋಧನಯತ್ನೋ ಽನ್-ಅಸಮ್ಮತಃ ಸ್ಯಾತ್. ↩ &lt;/details&gt; ↩ ### darśanē kāṅkṣitam ↩ sāravat-tattva-jñāna-viśēṣō **darśanam** iti. <text:s text:c="3"/>↩ abhyupagatēna darśanēna **ullāsa-pūrṇā jayiṣṇavaś** ca syāma. <text:s text:c="2"/>↩ <text:s/>↩ &lt;details&gt;&lt;summary&gt;vistāraḥ (draṣṭuṁ nōdyam)&lt;/summary&gt; ↩ <text:s/>↩ aiśvaryam ānandaś cēty ucyatē yugalam ētat. tattva-jñānāvēśēnaitat sādhyēta. <text:s text:c="2"/>↩ śāstrāntarēṣu kaiścit punarjanma-vāraṇam ity apītō ’ntarbhāvayantīṣṭam. ↩ &lt;/details&gt; ↩ <text:s/>↩ kvacij jaya-kāṅkṣā duḥkha-hētur bhavati - parājayō hi sahajō lōkē. <text:s text:c="2"/>↩ na kaścit sarvadā jayati. <text:s text:c="2"/>↩ tēnaitayōr iṣṭayōḥ **parasparavirōdhō** yathāsambhavaṁ **hrasanīyaḥ**. <text:s text:c="2"/>↩ <text:s/>↩ jayārthaṁ buddhimat-svabhāvāvirōdhārthaṁ ca <text:s text:c="2"/>↩ darśanaṁ **satyaṁ** syād ity apīṣṭam. <text:s text:c="2"/>↩ ataḥ prāmāṇikatā ’pēkṣitā. <text:s/>↩ <text:s/>↩ sad-darśanē ātma-jijñāsām, dēva-jijñāsāṁ cāntarā dēva-vibhūti-bhūta-lōka-jijñāsā ’pi dēvārādhanatvēna gr̥hyēta. <text:s/>↩ <text:s/>↩ &lt;details&gt;&lt;summary&gt;vistāraḥ (draṣṭuṁ nōdyam)&lt;/summary&gt; ↩ <text:s/>↩ A good religion ought to consider understanding nature (not just AtmA and the Gods) a sacred activity. Classical vedAnta (in practice, and often in theory) doesn't. Must fix. ↩ &lt;/details&gt; ↩ <text:s/>↩ <text:s/>↩ ### prāmāṇikatā ↩ jñānasya karaṇāni - <text:s text:c="2"/>↩ aduṣṭaṁ pratyakṣam, ūhaḥ, anumānaṁ cēti. <text:s text:c="2"/>↩ <text:s/>↩ &lt;details&gt;&lt;summary&gt;vistāraḥ (draṣṭuṁ nōdyam)&lt;/summary&gt; ↩ <text:s/>↩ madhvōdāhr̥tē brahmatarkē tu - <text:s/>↩ <text:s/>↩ &gt; upapatti-svarūpatvād <text:s text:c="2"/>↩ anumā +++(ēva)+++ sambhavādikam . <text:s text:c="2"/>↩ &lt;/details&gt; ↩ <text:s/>↩ <text:s/>↩ anumānam pūrva-dvayam ēvōtthambhayatīti na tāvat pr̥thag gaṇanā. <text:s text:c="2"/>↩ <text:s/>↩ jīvāntara-prayuktānīmāni tad-vāg-ādibhir labhāmahē. <text:s text:c="2"/>↩ kēcana jīvā viśiṣyaiṣu kuśalāḥ - svabhāvatō daivatō vā. <text:s text:c="2"/>↩ tad idaṁ viśvasta-sampradāya iti jñāna-karaṇāntaraṁ gaṇyatām - vastutaḥ pūrvōktānām ēva prakārāntaram. <text:s text:c="2"/>↩ asya nāmāntarēṣu - śabda, āpta-vacanam. <text:s text:c="2"/>↩ anumānasya svayaṁ sādhayitum bahudā śakyatvāt, <text:s text:c="2"/>↩ pratyakṣay ūhē ca viśiṣyōpakarōti viśvasta-sampradāyaḥ. <text:s/>↩ <text:s/>↩ pratyakṣa-pramāṇē svānubhūtayaḥ **upalabdhi**-śabda-vācyā api gr̥hyantē. <text:s text:c="2"/>↩ svapna-yōgi-dr̥ṣṭy-ādy ūhē ’ntar bhavati. <text:s text:c="2"/>↩ ūham api kāmaṁ pratyakṣē ’ntarbhāvayēt, <text:s text:c="2"/>↩ yady api sa parēṣāṁ pratyayāya na syāttarām. <text:s/>↩ <text:s/>↩ ēvam anumāna-śabdayōs tan-mūlakatvāt sva-tantra-pramāṇatvaṁ nāsti . ↩ kiñca, pratyakṣam apy aduṣṭaṁ syāt. <text:s text:c="2"/>↩ <text:s/>↩ tatō jñāna-prāptau (na tu sat-kāryāntarēṣu) - <text:s text:c="2"/>↩ rudrākṣādy-āvir-bhāvanādy aindrajālikaṁ "prakaṭa-vidyā"khyaṁ vā nētrādi-vañcanam vāraṇīyam. <text:s text:c="2"/>↩ <text:s/>↩ <text:s/>↩ #### viśvasta-sampradāyaḥ ↩ asya prakārēṣu śāstram, kāvyam, purāṇam ityādayō bhavanti. <text:s text:c="2"/>↩ atra śiṣṭācārō ’py antar-bhāvyaḥ. <text:s text:c="2"/>↩ <text:s/>↩ ##### pratyakṣa-mūlakāṁśaḥ ↩ tatra kaścana bhāgaḥ **pratyakṣa-mūlakaḥ** - <text:s text:c="2"/>↩ <text:s/>↩ &gt; puraivam avartata. <text:s text:c="2"/>↩ ēvaṁ saty ēvam bhavati. <text:s/>↩ <text:s/>↩ ityādi sūcayati. <text:s text:c="3"/>↩ tasminn aṁśē pratyakṣānurōdhēna svīkāram, pariṣkāraṁ vārhati sampradāyaḥ. <text:s text:c="2"/>↩ <text:s/>↩ atra dharma-śāstraikadēśō’py antarbhavati - dhārakatvaṁ mēyam iti. <text:s text:c="2"/>↩ ēvaṁ sva-bhāvānuvādō dr̥śyatē - <text:s text:c="2"/>↩ sampradāyāḥ suparīkṣitāḥ prayōgāḥ iti dhiyā. <text:s text:c="2"/>↩ idaṁ hi **kāla-pratiṣṭhē**ty apy ucyatām. <text:s/>↩ <text:s/>↩ &lt;details&gt;&lt;summary&gt;vistāraḥ (draṣṭuṁ nōdyam)&lt;/summary&gt; ↩ <text:s/>↩ nanu pāścātyā api <text:s/>"traditions are experiments which worked", "Lindy test", "Chesterton's fence" ityadi bruvatē. <text:s/>↩ &lt;/details&gt; ↩ <text:s/>↩ śāstrē vidhi-prēraṇārtham **ativādāḥ**, kathāḥ, ucchr̥ṅkhala-mūḍhēṣu bhaya-harṣādy-utpādanam ityādi dr̥śyatē. <text:s text:c="2"/>↩ <text:s/>↩ ##### ūha-mūlakāṁśaḥ ↩ kvacit śabdē kaścanāṁśō yōgi-pratyakṣa-mūlakaḥ, <text:s text:c="2"/>↩ **atīndriya-satya-sūcakō** ’pi vāstavikāṁśas syāt, <text:s text:c="2"/>↩ yō ’smābhir dur-vivēcyō bhavati. <text:s text:c="2"/>↩ <text:s/>↩ ##### sauṣṭhavam ↩ punaḥ kvacit sāmpradāyika-granthēṣu **prakṣēpās** sambhavanti, <text:s text:c="2"/>↩ yēṣu kēcit syus tyājyāḥ. <text:s/>↩ <text:s/>↩ ētat sadbhir vivicya <text:s text:c="2"/>↩ yathā-mātraṁ yathōddēśaṁ cāvagantavyam. <text:s text:c="2"/>↩ pratyakṣāvirōdhē, tattva-lāghava-sāmañjasyādy-anati-vyabhicārē ca <text:s text:c="2"/>↩ gaṇita-śāstra-stha-sqrt(-1)-saṅkhyēva svīkartum ucitam. <text:s text:c="2"/>↩ <text:s/>↩ kiñca, viśvastatara-śabdaikagamyē viṣayē sva-yuktyā bādhō nōcitaḥ. <text:s/>↩ <text:s/>↩ katamaḥ sampradāyō viśvasanīyaḥ, katarō na? <text:s text:c="2"/>↩ atrāntataḥ svagataviśvāsa ēva niścāyakaḥ. <text:s text:c="2"/>↩ sa viśvāsō yuktō <text:s text:c="2"/>↩ yadi nyāya-virōdhābhāva--kāla-pratiṣṭhā--’’rya-grāhyatādi-liṅgaiḥ paripuṣṭaḥ. <text:s text:c="2"/>↩ īdr̥śēṣu liṅgēṣu parāgamēṣu satsu, tē’py asmad-āgamāvirōdhēna grāhyās syuḥ. <text:s text:c="2"/>↩ <text:s/>↩ yathā khalu jayantabhaṭṭō vakti - ↩ <text:s/>↩ &gt; avicchinnā yēṣāṁ vahati saraṇiḥ sarvaviditā, <text:s text:c="2"/>↩ na yatrāryō lōkaḥ paricaya-kathālāpa-vimukhaḥ. <text:s text:c="2"/>↩ yadiṣṭānuṣṭhānaṁ na khalu janabhayaṁ na sabhayaṁ, <text:s text:c="2"/>↩ na rūpaṁ yēṣāṁ ca sphurati navam abhyutthitam iva.. <text:s text:c="2"/>↩ <text:s/>↩ &gt; pramattagītatvam alaukikatvam <text:s text:c="2"/>↩ ābhāti lōbhādi na yatra mūlam. <text:s text:c="2"/>↩ tathā-vidhānām ayam āgamānām <text:s text:c="2"/>↩ prāmāṇya-mārgō na tu yatra tatra.. ↩ <text:s/>↩ tēnāntatō ’yaṁ viśvāsaḥ pratyakṣamūlaka ēva. ↩#### ശ്രുത്യ്-ആദാവ് ഏക-വാക്യതാ-സാധനം ↩ <text:s/>↩ ശ്രുതയഃ, സ്മൃതയഃ, പുരാണാനി പ്രമാണം ഇത്യ് ആര്യൈർ ബഹുമതം. <text:s text:c="2"/>↩ ബഹുഷു സമ്പ്രദായേഷു ശ്രുത്യ്-ആദി-ഗ്രന്ഥേഷ്വ് ഏക-വാക്യതാ ഭവതീതി കിഞ്ചന കല്പനം. <text:s text:c="2"/>↩ തച് ചേഷ്ട ഏവ - <text:s text:c="3"/>↩ പരസ്പര-വിരുദ്ധാംശവതാം സപ്രദായാനാം അംശതഃ സംഗമഃ ശക്യഃ. <text:s text:c="2"/>↩ തേഷു സർവേഷു സമഞ്ജസാംശാഃ കാല-പ്രതിഷ്ഠിതാഃ കലനീയാ അസ്മത്-പ്രയോജനായ. ↩ <text:s/>↩ ഏതദ്-അർഥം സമ്പ്രദായേഷു പ്രമാണ്യ-ക്രമഃ കശ്ചന നിശ്ചേതും ഉചിതഃ. <text:s text:c="2"/>↩ ശ്രീവൈഷ്ണവാഭ്യുപഗത-പ്രാമാണ്യ-ക്രമഃ (വേങ്കടനാഥശാഖാ, വിസ്താരോ ഽന്യത്ര ദ്രഷ്ടവ്യഃ) - ↩ <text:s/>↩ അദുഷ്ടം പ്രത്യക്ഷം &gt; വേദാഃ, ബ്രഹ്മ-സൂത്രാണി &gt; സ്മൃതയഃ &gt; ഇതിഹാസൗ (രാമായണം വിശിഷ്യ) &gt; സാത്ത്വിക-പുരാണാനി (വിശിഷ്യ വിഷ്ണു-പുരാണം) &gt; പ്രസിദ്ധാ വൈഷ്ണവാ ആഗമാഃ, ദ്രവിഡ-ഗാഥാഃ, സമ്പ്രദായ-രഹസ്യ-ഗ്രന്ഥാഃ &gt; രാജസ-താമസ-പുരാണാനി, ഇതരാഗമാഃ &gt; ശിഷ്ടാചാരഃ &gt; ഐതിഹ്യം. ↩ <text:s/>↩ ## ജ്ഞാനം ↩ ### വർണ-വിന്യാസഃ ↩ **ജ്ഞാനം** നാമ കേനചിദ് ഭാഷാനുസാരി--വർണ-വിന്യാസേന ജ്ഞാപിതോ ഽർഥഃ. <text:s text:c="2"/>↩ അഥവാ, ജ്ഞാനത്വം കസ്യചിദ് വസ്തുനഃ ## विधि-कल्पः ↩ **विधि-कल्पो** (algorithm) नाम <text:s text:c="2"/>↩ वर्ण-विन्यास-परिवर्तनादेश-ततिः । <text:s text:c="2"/>↩ एष्व् आदेशेष्व् अनिश्चितता (randomness) अपि भवेत्। <text:s text:c="2"/>↩ अयम् अपि ज्ञान-विशेष एव। <text:s text:c="2"/>↩ विधि-कल्पः **सक्रियो वा निष्क्रियो** वा स्यात्। ↩ <text:s/>↩ विधि-कल्पाङ्गत्वेन +++(अहम् इति)+++ प्रत्यक्-प्रकाशो <text:s text:c="2"/>↩ भवति चेत् **चिद्** इत्य् उच्यते, **चैतन्यम्, चेत** इति वा। <text:s/>↩ <text:s/>↩ ### ज्ञानोद्भवः, ज्ञातृत्वम् ↩ सक्रिया विधि-कल्पा हि वाक्योद्भव-हेतवः, ततो ज्ञानोद्भव-हेतवश् च। <text:s text:c="2"/>↩ पुनस् तेषु ज्ञातृत्वं विद्यते - <text:s text:c="2"/>↩ वाक्यं किञ्चन पराम्रष्टुं शक्नुवन्तीति। <text:s/>↩ <text:s/>↩ विधि-कल्पश् च वाक्य-समूहान् नाना-भाषा-गतान् जनयेत्। <text:s text:c="2"/>↩ एवं विधि-कल्पाङ्गत्वेन **भाषा-ज्ञानम्** अपि स्यात्, यथाऽनुवाद-विधि-कल्पेषु (compilers)। ↩ <text:s/>↩ ### विधि-कल्पोद्भवः ↩ एको विधि-कल्पो <text:s text:c="2"/>↩ विधि-कल्पान्तरम् अप्य् एवम् उत्पादयेत्। <text:s text:c="2"/>↩ तं च जातं विधि-कल्पं सक्रियम् अपि कुर्यात्, समान-फलक-लेखकम् - <text:s text:c="2"/>↩ यथा ऋतेन निर्मिता मनुष्याः, <text:s text:c="2"/>↩ सङ्गणके नियन्तृ(Operating system)-चालितः तन्त्रांशः। <text:s text:c="2"/>↩ <text:s/>↩ अथवा स पृथग् अपि सृज्येत विधि-कल्पः, <text:s text:c="2"/>↩ यः स्रष्टृ-विधिकल्पाश्रयाश्रितः - <text:s text:c="2"/>↩ यथा मनुष्य-निर्मिताः सङ्गणक-यन्त्र-स्थाः। <text:s text:c="2"/>↩ <text:s/>↩ ### जटिलता (Complexity) ↩ सरल-विधि-कल्पाधारेण जटिल-ज्ञानानां विधिकल्पानां च सम्भवो नाश्चर्य-जनकः - <text:s text:c="2"/>↩ यथा Conway's game of life, गणितमात्राधारेण - AI, सङ्गणक-क्रीडा-पात्राणि। ↩ <text:s/>↩ ### आधारः ↩ एवं सक्रियस्य विधि-कल्पस्य सक्रियम् सफलकं विधि-कल्पान्तरम् **क्रियाधारः** स्यात्। <text:s text:c="2"/>↩ तस्याधार-भूत-विधि-कल्पान्तरस्य फलकस्य कश्चन ह्य् अंश <text:s text:c="2"/>↩ आधेय-विधि-कल्प-फलकम् भवति। <text:s text:c="2"/>↩ तच्चान्तरिकम् फलकम् इति ज्ञायताम्। <text:s/>↩ <text:s/>↩ #### इन्द्रियम् ↩ ज्ञानस्य कर्मणो वा करण-भूता विधि-कल्प--वृत्तिर् <text:s text:c="2"/>↩ **इन्द्रियम्** इत्य् उच्यताम्। <text:s text:c="2"/>↩ सङ्गणकयन्त्रेष्व् अक्षरशो वाक्यपठनक्रमो ऽपीन्द्रियम् एव। ↩ <text:s/>↩ न हि सर्वेषु जीव-जातिषु सर्वाणीन्द्रियाणि वर्तन्ते - <text:s text:c="2"/>↩ यथा केषुचित् प्राणिष्व् एव +अयःकान्तीयम् इन्द्रियम् (Magnetoreception)। <text:s text:c="2"/>↩ भिन्न-जीवेषु च समानस्येन्द्रियस्य बाले तारतम्यं वर्तते - यथा शुनके घ्राणबलम् अधिकं मनुष्यापेक्षया, दर्शन-बले विपरीतम्। ↩ <text:s/>↩ आन्तरिकाणीन्द्रियाणि पश्चान् निर्वक्ष्यन्ते। <text:s/>↩ <text:s/>↩ #### बाह्येन्द्रियम् ↩ बाह्येन्द्रियेषु **ज्ञानेन्द्रियं** नाम <text:s text:c="2"/>↩ कस्यचन विधिकल्पस्य ज्ञेयं वाक्यम् प्रभावयितुं समर्थं <text:s text:c="2"/>↩ काचन तद्-आधारभूत-विधिकल्पस्य वृत्तिः। <text:s text:c="2"/>↩ <text:s/>↩ साधारणतया ज्ञानेन्द्रियाणि नाम <text:s text:c="2"/>↩ +आन्तरिक-विज्ञान-जनन-रक्षण-वृत्तयः। <text:s text:c="3"/>↩ <text:s/>↩ बाह्येन्द्रियेषु **कर्मेन्द्रियं** नाम <text:s text:c="2"/>↩ कस्यचन विधिकल्पस्याज्ञा-वाक्यम् अनु <text:s text:c="2"/>↩ तद्-आधार-भूत-बाह्य-फलकं प्रभावयितुं समर्थं <text:s text:c="2"/>↩ काचन तद्-आधारभूत-विधिकल्पस्य वृत्तिः। <text:s text:c="2"/>↩ <text:s/>↩ ##### ज्ञानेन्द्रियाणि बाह्यानि ↩ ज्ञानेन्द्रियाणि नाम +आन्तरिक-विज्ञान-जनन-रक्षण-वृत्तयः। ↩ <text:s/>↩ श्रोत्र-चक्षुष्-ट्वग्-जिह्वा-नासा अणु-सङ्ग्रहा एव बाह्य-ज्ञान-ग्रहणाङ्गानि। <text:s text:c="2"/>↩ तैर् एव शब्द-स्पर्श-ताप-प्रभा-रस-गन्धात्मकानि विज्ञानानि गृह्यन्ते। <text:s text:c="2"/>↩ उर्जा-विन्यास-विशेषैर् अणु-कर्म-जातैर् वाक्य-रूपेण मस्तिष्कादिषु नीयन्ते। <text:s text:c="2"/>↩ तत्र च तेभ्यो दिङ्-नाम-रूपात्मकानि व्यक्त-तराणि वाक्यानि सृज्यन्ते। ↩ &lt;details&gt;&lt;summary&gt;𑀪𑁅𑀢𑀺𑀓𑀢𑀸 (𑀤𑁆𑀭𑀱𑁆𑀝𑀼𑀁 𑀦𑁄𑀤𑁆𑀬𑀫𑁆)&lt;/summary&gt; ↩ <text:s/>↩ 𑀯𑁃𑀰𑁂𑀱𑀺𑀓𑀸𑀂- ↩ <text:s/>↩ &gt; 𑀓𑀭𑁆𑀡𑀸𑀤𑁆𑀬𑁆-𑀅𑀗𑁆𑀕𑀸𑀦𑁆𑀬𑁆 𑀅𑀦𑁆𑀢𑀭𑀸 +𑀇𑀦𑁆𑀤𑁆𑀭𑀺𑀬𑀸𑀡𑀺 𑀯𑀺𑀰𑀺𑀱𑁆𑀝𑀸𑀦𑀺 𑀯𑀭𑁆𑀢𑀦𑁆𑀢𑁂 - <text:s text:c="2"/>↩ 𑀬𑀣𑀸 𑀤𑀾𑀰𑁆𑀬-𑀕𑁆𑀭𑀳𑀡𑀸𑀭𑁆𑀣𑀁 𑀢𑁃𑀚𑀲𑀫𑁆 𑀇𑀦𑁆𑀤𑁆𑀭𑁆𑀬𑀫𑁆, <text:s text:c="2"/>↩ 𑀲𑁆𑀧𑀭𑁆𑀰-𑀕𑁆𑀭𑀳𑀡𑀸𑀬 𑀯𑀸𑀬𑀯𑀻𑀬𑀫𑁆 𑀇𑀦𑁆𑀤𑁆𑀭𑀺𑀬𑀫𑁆 ↩ <text:s/>↩ 𑀇𑀢𑁆𑀬𑁆-𑀆𑀤𑀺 𑀓𑀮𑁆𑀧𑀺𑀢𑀯𑀦𑁆𑀢𑀂𑁇 ↩ 𑀅𑀧𑀭𑁂 𑀓𑁂𑀘𑀺𑀤𑁆 𑀇𑀦𑁆𑀤𑁆𑀭𑀺𑀬𑀸𑀡𑀸𑀁 𑀢𑁃𑀚𑀲𑀸𑀤𑀺𑀢𑁆𑀯𑀫𑁆/ 𑀪𑁅𑀢𑀺𑀓𑀢𑁆𑀯𑀫𑁆 𑀅𑀧𑀸𑀓𑀼𑀭𑁆𑀯𑀦𑁆 - <text:s text:c="2"/>↩ 𑀬𑀣𑀸 𑀯𑁂𑀗𑁆𑀓𑀝𑀦𑀸𑀣𑀸𑀭𑁆𑀬 <text:s text:c="2"/>↩ 𑀇𑀦𑁆𑀤𑁆𑀭𑀺𑀬𑀸𑀡𑀸𑀁 𑀰𑁆𑀭𑀼𑀢𑁆𑀬𑁆-𑀉𑀓𑁆𑀢𑁆𑀫𑁆 𑀆𑀳𑀗𑁆𑀓𑀸𑀭𑀺𑀓𑀢𑁆𑀯𑀫𑁆 𑀅𑀗𑁆𑀕𑁆𑀬𑁆 𑀅𑀓𑀭𑁄𑀢𑁆𑁇 ↩ <text:s/>↩ 𑀓𑀺𑀜𑁆𑀘 𑀢𑁂 𑀩𑀳𑀯𑁄 𑀯𑀺𑀱𑀬-𑀕𑁆𑀭𑀳𑀡𑀫𑁆 <text:s text:c="2"/>↩ 𑀦𑁂𑀢𑁆𑀭𑀸𑀤𑀺𑀤𑁆𑀯𑀸𑀭 𑀩𑀳𑀺𑀭𑁆 𑀦𑀺𑀭𑁆𑀕𑀘𑁆𑀙𑀢𑀸, 𑀯𑀺𑀓𑀲𑀢𑀸, 𑀓𑀺𑀭𑀡𑀸𑀦𑀺 𑀧𑁆𑀭𑀓𑀺𑀭𑀢𑀸 𑀯𑀸 <text:s text:c="2"/>↩ 𑀓𑁂𑀦𑀘𑀺𑀤𑁆 𑀇𑀦𑁆𑀤𑁆𑀭𑀺𑀬𑁂𑀡 𑀯𑀺𑀱𑀬-𑀲𑀦𑁆𑀦𑀺𑀓𑀭𑁆𑀱𑀫𑁆 𑀊𑀘𑀼𑀂𑁇+++(5)+++ ↩ <text:s/>↩ 𑀦𑁃𑀢𑀤𑁆 𑀆𑀥𑀼𑀦𑀺𑀓-𑀪𑀽𑀢-𑀚𑁆𑀜𑀸𑀦𑁂𑀦 𑀲𑀗𑁆𑀕𑀘𑁆𑀙𑀢𑁂𑁇 <text:s text:c="2"/>↩ 𑀲𑀗𑁆𑀕𑀡𑀓𑀬𑀦𑁆𑀢𑁆𑀭𑀲𑁆𑀬 webcam, microphone 𑀇𑀢𑁆𑀬𑀸𑀤𑀺𑀪𑀺𑀭𑁆 𑀯𑀺𑀱𑀬𑀕𑁆𑀭𑀳𑀡𑀁 𑀓𑀣𑀫𑁆? <text:s text:c="2"/>↩ 𑀓𑀣𑀜𑁆𑀘𑀸𑀥𑀼𑀦𑀺𑀓-𑀯𑀺𑀚𑁆𑀜𑀸𑀦𑀸𑀦𑀼𑀲𑀸𑀭𑁂𑀡 𑀦𑁂𑀢𑁆𑀭𑀸𑀤𑀺𑀪𑀺𑀭𑁆 𑀯𑀺𑀱𑀬𑀕𑁆𑀭𑀳𑀡𑀫𑁆? <text:s text:c="2"/>↩ 𑀯𑀺𑀱𑀬𑁂𑀪𑁆𑀬𑁄 𑀦𑀺𑀭𑁆𑀕𑀘𑁆𑀙𑀤𑁆𑀪𑀺𑀂 𑀧𑁆𑀭𑀓𑀸𑀰-𑀰𑀩𑁆𑀤𑀸𑀤𑀺-𑀢𑀭𑀗𑁆𑀕𑁃𑀭𑁆 <text:s text:c="2"/>↩ 𑀦𑁂𑀢𑁆𑀭𑀁 camera 𑀇𑀢𑁆𑀬𑀸𑀤𑀺-𑀩𑀸𑀳𑁆𑀬𑀸𑀗𑁆𑀕-𑀤𑁆𑀯𑀸𑀭𑀸 𑀧𑁆𑀭𑀯𑀺𑀰𑁆𑀬 <text:s text:c="2"/>↩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 Cn" svg:font-family="'Noto Sans Devanagari Cn'" style:font-family-generic="roman" style:font-pitch="variable"/>
    <style:font-face style:name="Noto Sans Mono" svg:font-family="'Noto Sans Mono'" style:font-family-generic="roman" style:font-pitch="variable"/>
    <style:font-face style:name="Noto Sans Mono Condensed" svg:font-family="'Noto Sans Mono Condensed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8098in" fo:page-height="11.8098in" style:num-format="1" style:print-orientation="portrait" fo:margin-top="0.3902in" fo:margin-bottom="0.3902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5:25:46.746155051</meta:creation-date>
    <dc:date>2026-03-24T15:45:26.667412170</dc:date>
    <meta:editing-duration>PT19M40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" meta:word-count="1185" meta:character-count="8133" meta:non-whitespace-character-count="6625"/>
  </office:meta>
</office:document-meta>
</file>